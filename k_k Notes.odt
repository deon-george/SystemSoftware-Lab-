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K_K NOTES</text:p>
      <text:p text:style-name="Standard"/>
      <text:p text:style-name="Standard">Overview</text:p>
      <text:p text:style-name="Standard"/>
      <text:p text:style-name="Standard">KKNotes Bot is a lightweight, fast, Telegram-based automation solution that gives students instant access to academic resources directly inside Telegram. The primary focus of the system is to reduce friction and time wastage during study, and turn Telegram into a smart academic assistant where notes, videos, and study materials are just one tap away.</text:p>
      <text:p text:style-name="Standard"/>
      <text:p text:style-name="Standard"/>
      <text:p text:style-name="Standard">1) Technology Stack and Architecture</text:p>
      <text:p text:style-name="Standard"/>
      <text:p text:style-name="Standard">The bot is implemented using Python (aiogram v3) which supports modern async behavior for Telegram Bot API. Data is stored in MongoDB, and if MongoDB is not available (example: local development), the application automatically falls back to in-memory storage. Because of this dual-mode support, the bot runs smoothly in both development machines and deployed public servers without extra configuration.</text:p>
      <text:p text:style-name="Standard"/>
      <text:p text:style-name="Standard"/>
      <text:p text:style-name="Standard">2) User Capabilities and Interaction Flow</text:p>
      <text:p text:style-name="Standard"/>
      <text:p text:style-name="Standard">Students can browse categories, pick subjects, and directly request available resources. They can also submit new academic materials (PDF links, YouTube playlist links, notes, etc.). Every submission is stored first in “pending” state until an admin reviews it.</text:p>
      <text:p text:style-name="Standard"/>
      <text:p text:style-name="Standard">3) Moderation Flow and Admin Panel</text:p>
      <text:p text:style-name="Standard"/>
      <text:p text:style-name="Standard">Admins have complete control over quality. Submissions arrive in the pending database, and admins can approve or reject each item. Approval pushes the data into the main public collections. All actions are logged. This ensures the crowd-sourced data does not become junk and maintains academic value.</text:p>
      <text:p text:style-name="Standard"/>
      <text:p text:style-name="Standard"/>
      <text:p text:style-name="Standard">4) Reliability, Expiry, and Quality Control</text:p>
      <text:p text:style-name="Standard"/>
      <text:p text:style-name="Standard">TTL (Time-To-Live) indexes are used on pending collections. If a pending submission stays unreviewed for a long time, it automatically expires and is deleted. This avoids database pollution and ensures pending queues remain clean.</text:p>
      <text:p text:style-name="Standard"/>
      <text:p text:style-name="Standard">Environment-based configuration is used, so development, testing, and production environments stay separate and safe.</text:p>
      <text:p text:style-name="Standard"/>
      <text:p text:style-name="Standard"/>
      <text:p text:style-name="Standard"><text:s/>DATABASE SCHEMA</text:p>
      <text:p text:style-name="Standard"/>
      <text:p text:style-name="Standard"><text:s/>###Collections</text:p>
      <text:p text:style-name="Standard"/>
      <text:p text:style-name="Standard">| Collection Name <text:s text:c="5"/>| Purpose <text:s text:c="77"/>|</text:p>
      <text:p text:style-name="Standard">| -------------------- | ------------------------------------------------------------------------------------ |</text:p>
      <text:p text:style-name="Standard"><text:soft-page-break/>| `categories` <text:s text:c="8"/>| Stores valid categories that students can browse (scheme, branch, semester, subject) |</text:p>
      <text:p text:style-name="Standard">| `resources` <text:s text:c="9"/>| Stores approved public resources <text:s text:c="52"/>|</text:p>
      <text:p text:style-name="Standard">| `pending_categories` | Newly submitted categories (waiting for admin review) <text:s text:c="31"/>|</text:p>
      <text:p text:style-name="Standard">| `pending_resources` <text:s/>| Newly submitted resources (waiting for admin review) <text:s text:c="32"/>|</text:p>
      <text:p text:style-name="Standard"/>
      <text:p text:style-name="Standard"/>
      <text:p text:style-name="Standard"/>
      <text:p text:style-name="Standard"><text:s/>### `categories` Document Structure</text:p>
      <text:p text:style-name="Standard"/>
      <text:p text:style-name="Standard">```json</text:p>
      <text:p text:style-name="Standard">{</text:p>
      <text:p text:style-name="Standard"><text:s text:c="2"/>_id: ObjectId,</text:p>
      <text:p text:style-name="Standard"><text:s text:c="2"/>scheme: "2019",</text:p>
      <text:p text:style-name="Standard"><text:s text:c="2"/>branch: "CSE",</text:p>
      <text:p text:style-name="Standard"><text:s text:c="2"/>semester: "5",</text:p>
      <text:p text:style-name="Standard"><text:s text:c="2"/>subject: "DISASTER MANAGEMENT"</text:p>
      <text:p text:style-name="Standard">}</text:p>
      <text:p text:style-name="Standard">```</text:p>
      <text:p text:style-name="Standard"/>
      <text:p text:style-name="Standard"/>
      <text:p text:style-name="Standard"/>
      <text:p text:style-name="Standard">### `resources` Document Structure</text:p>
      <text:p text:style-name="Standard"/>
      <text:p text:style-name="Standard">```json</text:p>
      <text:p text:style-name="Standard">{</text:p>
      <text:p text:style-name="Standard"><text:s text:c="2"/>_id: ObjectId,</text:p>
      <text:p text:style-name="Standard"><text:s text:c="2"/>scheme: "2019",</text:p>
      <text:p text:style-name="Standard"><text:s text:c="2"/>branch: "CSE",</text:p>
      <text:p text:style-name="Standard"><text:s text:c="2"/>semester: "5",</text:p>
      <text:p text:style-name="Standard"><text:s text:c="2"/>subject: "DISASTER MANAGEMENT",</text:p>
      <text:p text:style-name="Standard"><text:s text:c="2"/>type: "note" | "video",</text:p>
      <text:p text:style-name="Standard"><text:s text:c="2"/>module: "Module 2",</text:p>
      <text:p text:style-name="Standard"><text:s text:c="2"/>data: "&lt;URL&gt;",</text:p>
      <text:p text:style-name="Standard"><text:s text:c="2"/>date_added: ISODate()</text:p>
      <text:p text:style-name="Standard">}</text:p>
      <text:p text:style-name="Standard">```</text:p>
      <text:p text:style-name="Standard"/>
      <text:p text:style-name="Standard"/>
      <text:p text:style-name="Standard"/>
      <text:p text:style-name="Standard">### `pending_categories` Document Structure</text:p>
      <text:p text:style-name="Standard"/>
      <text:p text:style-name="Standard">```json</text:p>
      <text:p text:style-name="Standard">{</text:p>
      <text:p text:style-name="Standard"><text:s text:c="2"/>_id: ObjectId,</text:p>
      <text:p text:style-name="Standard"><text:s text:c="2"/>scheme: "...",</text:p>
      <text:p text:style-name="Standard"><text:s text:c="2"/>branch: "...",</text:p>
      <text:p text:style-name="Standard"><text:s text:c="2"/>semester: "...",</text:p>
      <text:p text:style-name="Standard"><text:s text:c="2"/>subject: "...",</text:p>
      <text:p text:style-name="Standard"><text:soft-page-break/><text:s text:c="2"/>expires_at: ISODate() <text:s/>// TTL auto delete</text:p>
      <text:p text:style-name="Standard">}</text:p>
      <text:p text:style-name="Standard">```</text:p>
      <text:p text:style-name="Standard"/>
      <text:p text:style-name="Standard"/>
      <text:p text:style-name="Standard"/>
      <text:p text:style-name="Standard">### `pending_resources` Document Structure</text:p>
      <text:p text:style-name="Standard"/>
      <text:p text:style-name="Standard">```json</text:p>
      <text:p text:style-name="Standard">{</text:p>
      <text:p text:style-name="Standard"><text:s text:c="2"/>_id: ObjectId,</text:p>
      <text:p text:style-name="Standard"><text:s text:c="2"/>scheme: "...",</text:p>
      <text:p text:style-name="Standard"><text:s text:c="2"/>branch: "...",</text:p>
      <text:p text:style-name="Standard"><text:s text:c="2"/>semester: "...",</text:p>
      <text:p text:style-name="Standard"><text:s text:c="2"/>subject: "...",</text:p>
      <text:p text:style-name="Standard"><text:s text:c="2"/>type: "...",</text:p>
      <text:p text:style-name="Standard"><text:s text:c="2"/>module: "...",</text:p>
      <text:p text:style-name="Standard"><text:s text:c="2"/>data: "&lt;URL&gt;",</text:p>
      <text:p text:style-name="Standard"><text:s text:c="2"/>expires_at: ISODate() <text:s/>// TTL auto delete</text:p>
      <text:p text:style-name="Standard">}</text:p>
      <text:p text:style-name="Standard">```</text:p>
      <text:p text:style-name="Standard"/>
      <text:p text:style-name="Standard"/>
      <text:p text:style-name="Standard"/>
      <text:p text:style-name="Standard"><text:s/>Final Purpose</text:p>
      <text:p text:style-name="Standard"/>
      <text:p text:style-name="Standard">KKNotes Bot is designed to create a clean, crowdsourced academic library inside Telegram. Minimal overhead. Fast access. Zero friction. It turns Telegram into a powerful study companion and makes academic content discovery faster and better for students.</text:p>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5T10:34:26.535724303</meta:creation-date>
    <dc:date>2025-11-05T10:35:54.608273166</dc:date>
    <meta:editing-duration>PT1M28S</meta:editing-duration>
    <meta:editing-cycles>1</meta:editing-cycles>
    <meta:generator>LibreOffice/25.2.6.2$Linux_X86_64 LibreOffice_project/520$Build-2</meta:generator>
    <meta:document-statistic meta:table-count="0" meta:image-count="0" meta:object-count="0" meta:page-count="3" meta:paragraph-count="71" meta:word-count="472" meta:character-count="3579" meta:non-whitespace-character-count="2899"/>
  </office:meta>
</office:document-meta>
</file>